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Kp" svg:font-family="Kp" style:font-family-generic="roman"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text-properties style:font-name="Times New Roman" fo:font-weight="bold" style:font-weight-asian="bold" style:font-weight-complex="bold" fo:font-size="11pt" style:font-size-asian="11pt" style:font-size-complex="11pt" fo:language="en" fo:country="US"/>
    </style:style>
    <style:style style:name="P2" style:parent-style-name="Standard" style:family="paragraph">
      <style:text-properties style:font-name="Times New Roman" fo:font-weight="bold" style:font-weight-asian="bold" style:font-weight-complex="bold" fo:font-size="11pt" style:font-size-asian="11pt" style:font-size-complex="11pt" fo:language="en" fo:country="US"/>
    </style:style>
    <style:style style:name="P3" style:parent-style-name="Standard" style:family="paragraph">
      <style:text-properties style:font-name="Times New Roman" fo:font-weight="bold" style:font-weight-asian="bold" style:font-weight-complex="bold" fo:language="en" fo:country="US"/>
    </style:style>
    <style:style style:name="P4" style:parent-style-name="Standard" style:family="paragraph">
      <style:paragraph-properties fo:text-align="center"/>
      <style:text-properties style:font-name="Times New Roman" fo:font-weight="bold" style:font-weight-asian="bold" style:font-weight-complex="bold" fo:language="en" fo:country="US"/>
    </style:style>
    <style:style style:name="P5" style:parent-style-name="Standard" style:family="paragraph">
      <style:paragraph-properties fo:text-align="center"/>
      <style:text-properties style:font-name="Times New Roman" fo:font-weight="bold" style:font-weight-asian="bold" style:font-weight-complex="bold" fo:language="en" fo:country="US"/>
    </style:style>
    <style:style style:name="P6" style:parent-style-name="Standard" style:family="paragraph">
      <style:text-properties style:font-name="Times New Roman" fo:font-weight="bold" style:font-weight-asian="bold" style:font-weight-complex="bold" fo:language="en" fo:country="US"/>
    </style:style>
    <style:style style:name="P7" style:parent-style-name="Standard" style:family="paragraph">
      <style:text-properties style:font-name="Times New Roman" fo:font-weight="bold" style:font-weight-asian="bold" style:font-weight-complex="bold" fo:language="en" fo:country="US"/>
    </style:style>
    <style:style style:name="P8" style:parent-style-name="Standard" style:family="paragraph">
      <style:text-properties style:font-name="Times New Roman" fo:font-weight="bold" style:font-weight-asian="bold" style:font-weight-complex="bold" fo:language="en" fo:country="US"/>
    </style:style>
    <style:style style:name="P9" style:parent-style-name="Standard" style:family="paragraph">
      <style:text-properties style:font-name="Times New Roman" fo:font-weight="bold" style:font-weight-asian="bold" style:font-weight-complex="bold" fo:language="en" fo:country="US"/>
    </style:style>
    <style:style style:name="P10" style:parent-style-name="Standard" style:family="paragraph">
      <style:text-properties style:font-name="Times New Roman" fo:font-weight="bold" style:font-weight-asian="bold" style:font-weight-complex="bold" fo:language="en" fo:country="US"/>
    </style:style>
    <style:style style:name="P11" style:parent-style-name="Standard" style:family="paragraph">
      <style:text-properties style:font-name="Times New Roman" fo:font-weight="bold" style:font-weight-asian="bold" style:font-weight-complex="bold" fo:language="en" fo:country="US"/>
    </style:style>
    <style:style style:name="P12" style:parent-style-name="Standard" style:family="paragraph">
      <style:text-properties style:font-name="Times New Roman" fo:font-weight="bold" style:font-weight-asian="bold" style:font-weight-complex="bold" fo:language="en" fo:country="US"/>
    </style:style>
    <style:style style:name="P13" style:parent-style-name="Standard" style:family="paragraph">
      <style:text-properties style:font-name="Times New Roman" fo:font-weight="bold" style:font-weight-asian="bold" style:font-weight-complex="bold" fo:language="en" fo:country="US"/>
    </style:style>
    <style:style style:name="P14" style:parent-style-name="Standard" style:family="paragraph">
      <style:text-properties style:font-name="Times New Roman" fo:font-weight="bold" style:font-weight-asian="bold" style:font-weight-complex="bold" fo:language="en" fo:country="US"/>
    </style:style>
    <style:style style:name="P15" style:parent-style-name="Standard" style:family="paragraph">
      <style:text-properties style:font-name="Times New Roman" fo:font-weight="bold" style:font-weight-asian="bold" style:font-weight-complex="bold" fo:language="en" fo:country="US"/>
    </style:style>
    <style:style style:name="P16" style:parent-style-name="Standard" style:family="paragraph">
      <style:text-properties style:font-name="Times New Roman" fo:font-weight="bold" style:font-weight-asian="bold" style:font-weight-complex="bold" fo:language="en" fo:country="US"/>
    </style:style>
    <style:style style:name="P17" style:parent-style-name="Standard" style:family="paragraph">
      <style:text-properties style:font-name="Times New Roman" fo:font-weight="bold" style:font-weight-asian="bold" style:font-weight-complex="bold" fo:language="en" fo:country="US"/>
    </style:style>
    <style:style style:name="P18" style:parent-style-name="Textbody" style:family="paragraph">
      <style:text-properties style:font-name="Times New Roman" fo:font-weight="bold" style:font-weight-asian="bold" style:font-weight-complex="bold" fo:font-style="italic" style:font-style-asian="italic" style:font-style-complex="italic" fo:color="#000000" fo:language="en" fo:country="US"/>
    </style:style>
    <style:style style:name="P19" style:parent-style-name="Standard" style:family="paragraph">
      <style:paragraph-properties fo:text-align="justify"/>
      <style:text-properties style:font-name="Times New Roman" fo:language="en" fo:country="US"/>
    </style:style>
    <style:style style:name="P20" style:parent-style-name="Standard" style:family="paragraph">
      <style:paragraph-properties fo:text-align="justify"/>
      <style:text-properties style:font-name="Times New Roman" fo:language="en" fo:country="US"/>
    </style:style>
    <style:style style:name="P21" style:parent-style-name="Standard" style:family="paragraph">
      <style:paragraph-properties fo:text-align="justify"/>
      <style:text-properties style:font-name="Times New Roman" fo:language="en" fo:country="US"/>
    </style:style>
    <style:style style:name="P22" style:parent-style-name="Standard" style:family="paragraph">
      <style:paragraph-properties fo:text-align="justify"/>
      <style:text-properties style:font-name="Times New Roman" fo:language="en" fo:country="US"/>
    </style:style>
    <style:style style:name="P23" style:parent-style-name="Standard" style:family="paragraph">
      <style:paragraph-properties fo:text-align="justify"/>
      <style:text-properties style:font-name="Times New Roman" fo:language="en" fo:country="US"/>
    </style:style>
    <style:style style:name="P24" style:parent-style-name="Textbody" style:family="paragraph">
      <style:text-properties style:font-name="Times New Roman" fo:font-weight="bold" style:font-weight-asian="bold" style:font-weight-complex="bold" fo:font-style="italic" style:font-style-asian="italic" style:font-style-complex="italic" fo:color="#000000" fo:language="en" fo:country="US"/>
    </style:style>
    <style:style style:name="P25" style:parent-style-name="Standard" style:family="paragraph">
      <style:paragraph-properties fo:text-align="justify"/>
      <style:text-properties style:font-name="Times New Roman" fo:language="en" fo:country="US"/>
    </style:style>
    <style:style style:name="P26" style:parent-style-name="Standard" style:family="paragraph">
      <style:paragraph-properties fo:text-align="justify"/>
      <style:text-properties style:font-name="Times New Roman" fo:language="en" fo:country="US"/>
    </style:style>
    <style:style style:name="P27" style:parent-style-name="Standard" style:family="paragraph">
      <style:paragraph-properties fo:text-align="justify"/>
      <style:text-properties style:font-name="Times New Roman" fo:language="en" fo:country="US"/>
    </style:style>
    <style:style style:name="P28" style:parent-style-name="Standard" style:family="paragraph">
      <style:paragraph-properties fo:text-align="justify"/>
      <style:text-properties style:font-name="Times New Roman" fo:language="en" fo:country="US"/>
    </style:style>
    <style:style style:name="P29" style:parent-style-name="Standard" style:family="paragraph">
      <style:paragraph-properties fo:text-align="justify"/>
      <style:text-properties style:font-name="Times New Roman" fo:language="en" fo:country="US"/>
    </style:style>
    <style:style style:name="P30" style:parent-style-name="Textbody" style:family="paragraph">
      <style:text-properties style:font-name="Times New Roman" fo:font-weight="bold" style:font-weight-asian="bold" style:font-weight-complex="bold" fo:font-style="italic" style:font-style-asian="italic" style:font-style-complex="italic" fo:color="#000000" fo:language="en" fo:country="US"/>
    </style:style>
    <style:style style:name="P31" style:parent-style-name="Standard" style:family="paragraph">
      <style:paragraph-properties fo:text-align="justify"/>
      <style:text-properties style:font-name="Times New Roman" fo:language="en" fo:country="US"/>
    </style:style>
    <style:style style:name="P32" style:parent-style-name="Standard" style:family="paragraph">
      <style:paragraph-properties fo:text-align="justify"/>
      <style:text-properties style:font-name="Times New Roman" fo:language="en" fo:country="US"/>
    </style:style>
    <style:style style:name="P33" style:parent-style-name="Standard" style:family="paragraph">
      <style:paragraph-properties fo:text-align="justify"/>
      <style:text-properties style:font-name="Times New Roman" fo:language="en" fo:country="US"/>
    </style:style>
    <style:style style:name="P34" style:parent-style-name="Standard" style:family="paragraph">
      <style:paragraph-properties fo:text-align="justify"/>
      <style:text-properties style:font-name="Times New Roman" fo:language="en" fo:country="US"/>
    </style:style>
    <style:style style:name="P35" style:parent-style-name="Standard" style:family="paragraph">
      <style:paragraph-properties fo:text-align="justify"/>
      <style:text-properties style:font-name="Times New Roman" fo:language="en" fo:country="US"/>
    </style:style>
    <style:style style:name="P36" style:parent-style-name="Standard" style:family="paragraph">
      <style:paragraph-properties fo:text-align="justify"/>
      <style:text-properties style:font-name="Times New Roman" fo:language="en" fo:country="US"/>
    </style:style>
    <style:style style:name="P37" style:parent-style-name="Standard" style:family="paragraph">
      <style:paragraph-properties fo:text-align="justify"/>
      <style:text-properties style:font-name="Times New Roman" fo:language="en" fo:country="US"/>
    </style:style>
    <style:style style:name="P38" style:parent-style-name="Standard" style:family="paragraph">
      <style:paragraph-properties fo:text-align="justify"/>
      <style:text-properties style:font-name="Times New Roman" fo:language="en" fo:country="US"/>
    </style:style>
    <style:style style:name="P39" style:parent-style-name="Standard" style:family="paragraph">
      <style:paragraph-properties fo:text-align="justify"/>
      <style:text-properties style:font-name="Times New Roman" fo:language="en" fo:country="US"/>
    </style:style>
    <style:style style:name="P40" style:parent-style-name="Standard" style:family="paragraph">
      <style:paragraph-properties fo:text-align="justify"/>
      <style:text-properties style:font-name="Times New Roman" fo:language="en" fo:country="US"/>
    </style:style>
    <style:style style:name="P41" style:parent-style-name="Standard" style:family="paragraph">
      <style:paragraph-properties fo:text-align="justify"/>
      <style:text-properties style:font-name="Times New Roman" fo:language="en" fo:country="US"/>
    </style:style>
    <style:style style:name="P42" style:parent-style-name="Standard" style:family="paragraph">
      <style:text-properties style:font-name="Times New Roman" fo:font-weight="bold" style:font-weight-asian="bold" style:font-weight-complex="bold" fo:language="en" fo:country="US"/>
    </style:style>
    <style:style style:name="P43" style:parent-style-name="Standard" style:family="paragraph">
      <style:paragraph-properties fo:text-align="justify"/>
      <style:text-properties style:font-name="Times New Roman" fo:language="en" fo:country="US"/>
    </style:style>
    <style:style style:name="P44" style:parent-style-name="Standard" style:family="paragraph">
      <style:paragraph-properties fo:text-align="justify"/>
      <style:text-properties style:font-name="Times New Roman" fo:language="en" fo:country="US"/>
    </style:style>
    <style:style style:name="P45" style:parent-style-name="Standard" style:family="paragraph">
      <style:paragraph-properties fo:text-align="justify"/>
      <style:text-properties style:font-name="Times New Roman" fo:language="en" fo:country="US"/>
    </style:style>
    <style:style style:name="P46" style:parent-style-name="Standard" style:family="paragraph">
      <style:paragraph-properties fo:text-align="justify"/>
      <style:text-properties style:font-name="Times New Roman" fo:language="en" fo:country="US"/>
    </style:style>
    <style:style style:name="P47" style:parent-style-name="Standard" style:family="paragraph">
      <style:paragraph-properties fo:text-align="justify"/>
    </style:style>
    <style:style style:name="T48" style:parent-style-name="Policepardéfaut" style:family="text">
      <style:text-properties style:font-name="Times New Roman" fo:language="en" fo:country="US"/>
    </style:style>
    <style:style style:name="P49" style:parent-style-name="Standard" style:family="paragraph">
      <style:text-properties style:font-name="Times New Roman" fo:font-weight="bold" style:font-weight-asian="bold" style:font-weight-complex="bold" fo:language="en" fo:country="US"/>
    </style:style>
    <style:style style:name="P50" style:parent-style-name="Standard" style:family="paragraph">
      <style:text-properties style:font-name="Times New Roman" fo:font-weight="bold" style:font-weight-asian="bold" style:font-weight-complex="bold" fo:language="en" fo:country="US"/>
    </style:style>
    <style:style style:name="P51" style:parent-style-name="Standard" style:family="paragraph">
      <style:text-properties style:font-name="Times New Roman" fo:font-weight="bold" style:font-weight-asian="bold" style:font-weight-complex="bold" fo:language="en" fo:country="US"/>
    </style:style>
    <style:style style:name="P52" style:parent-style-name="Standard" style:family="paragraph">
      <style:text-properties style:font-name="Times New Roman" fo:language="en" fo:country="US"/>
    </style:style>
    <style:style style:name="P53" style:parent-style-name="Standard" style:family="paragraph">
      <style:paragraph-properties fo:text-align="justify"/>
      <style:text-properties style:font-name="Times New Roman" fo:language="en" fo:country="US"/>
    </style:style>
    <style:style style:name="P54" style:parent-style-name="Standard" style:family="paragraph">
      <style:paragraph-properties fo:text-align="justify"/>
      <style:text-properties style:font-name="Times New Roman" fo:language="en" fo:country="US"/>
    </style:style>
    <style:style style:name="P55" style:parent-style-name="Standard" style:family="paragraph">
      <style:paragraph-properties fo:text-align="justify"/>
      <style:text-properties style:font-name="Times New Roman" fo:language="en" fo:country="US"/>
    </style:style>
    <style:style style:name="P56" style:parent-style-name="Standard" style:family="paragraph">
      <style:paragraph-properties fo:text-align="justify"/>
      <style:text-properties style:font-name="Times New Roman" fo:language="en" fo:country="US"/>
    </style:style>
    <style:style style:name="P57" style:parent-style-name="Standard" style:family="paragraph">
      <style:paragraph-properties fo:text-align="justify"/>
    </style:style>
    <style:style style:name="T58" style:parent-style-name="Policepardéfaut" style:family="text">
      <style:text-properties style:font-name="Times New Roman" fo:language="en" fo:country="US"/>
    </style:style>
    <style:style style:name="T59" style:parent-style-name="Policepardéfaut" style:family="text">
      <style:text-properties style:font-name="Times New Roman"/>
    </style:style>
    <style:style style:name="P60" style:parent-style-name="Standard" style:family="paragraph">
      <style:paragraph-properties fo:text-align="justify"/>
    </style:style>
    <style:style style:name="T61" style:parent-style-name="Policepardéfaut" style:family="text">
      <style:text-properties style:font-name="Times New Roman"/>
    </style:style>
    <style:style style:name="T62" style:parent-style-name="Policepardéfaut" style:family="text">
      <style:text-properties style:font-name="Times New Roman" fo:language="en" fo:country="US"/>
    </style:style>
    <style:style style:name="P63" style:parent-style-name="Standard" style:family="paragraph">
      <style:paragraph-properties fo:text-align="justify"/>
    </style:style>
    <style:style style:name="T64" style:parent-style-name="Policepardéfaut" style:family="text">
      <style:text-properties style:font-name="Times New Roman"/>
    </style:style>
    <style:style style:name="T65" style:parent-style-name="Policepardéfaut" style:family="text">
      <style:text-properties style:font-name="Times New Roman" fo:language="en" fo:country="US"/>
    </style:style>
    <style:style style:name="P66" style:parent-style-name="Standard" style:family="paragraph">
      <style:paragraph-properties fo:text-align="justify"/>
      <style:text-properties style:font-name="Times New Roman" fo:language="en" fo:country="US"/>
    </style:style>
    <style:style style:name="P67" style:parent-style-name="Standard" style:family="paragraph">
      <style:paragraph-properties fo:text-align="justify"/>
      <style:text-properties style:font-name="Times New Roman" fo:language="en" fo:country="US"/>
    </style:style>
    <style:style style:name="P68" style:parent-style-name="Standard" style:family="paragraph">
      <style:paragraph-properties fo:text-align="justify"/>
      <style:text-properties style:font-name="Times New Roman" fo:language="en" fo:country="US"/>
    </style:style>
    <style:style style:name="P69" style:parent-style-name="Standard" style:family="paragraph">
      <style:paragraph-properties fo:text-align="justify"/>
      <style:text-properties style:font-name="Times New Roman" fo:language="en" fo:country="US"/>
    </style:style>
    <style:style style:name="P70" style:parent-style-name="Standard" style:family="paragraph">
      <style:paragraph-properties fo:text-align="justify"/>
      <style:text-properties style:font-name="Times New Roman" fo:language="en" fo:country="US"/>
    </style:style>
    <style:style style:name="P71" style:parent-style-name="Standard" style:family="paragraph">
      <style:paragraph-properties fo:text-align="justify"/>
    </style:style>
    <style:style style:name="T72" style:parent-style-name="Policepardéfaut" style:family="text">
      <style:text-properties style:font-name="Times New Roman"/>
    </style:style>
    <style:style style:name="T73" style:parent-style-name="Policepardéfaut" style:family="text">
      <style:text-properties style:font-name="Times New Roman" fo:language="en" fo:country="US"/>
    </style:style>
    <style:style style:name="P74" style:parent-style-name="Standard" style:family="paragraph">
      <style:paragraph-properties fo:text-align="justify"/>
    </style:style>
    <style:style style:name="T75" style:parent-style-name="Policepardéfaut" style:family="text">
      <style:text-properties style:font-name="Times New Roman" fo:language="en" fo:country="US"/>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Research Paper -</text:p>
      <text:p text:style-name="P2"/>
      <text:p text:style-name="P3"/>
      <text:p text:style-name="P4">Towards an explainable conversational recommender system based on LLMs :</text:p>
      <text:p text:style-name="P5">Integrating embeddings, XAI and AutoML</text:p>
      <text:p text:style-name="P6"/>
      <text:p text:style-name="P7"/>
      <text:p text:style-name="P8"/>
      <text:p text:style-name="P9"/>
      <text:p text:style-name="P10"/>
      <text:p text:style-name="P11">1. Introduction</text:p>
      <text:p text:style-name="P12">…</text:p>
      <text:p text:style-name="P13"/>
      <text:p text:style-name="P14"/>
      <text:p text:style-name="P15"/>
      <text:p text:style-name="P16">2. Related Work</text:p>
      <text:p text:style-name="P17"/>
      <text:p text:style-name="P18">2.1 LLM-based recommendation</text:p>
      <text:p text:style-name="P19"><text:s text:c="3"/>The integration of LLMs into recommender systems has attracted considerable attention from recent studies. LLMs are increasingly reshaping recommendation systems by providing enhanced capabilities in natural language understanding and reasoning [1]. In this context, conversational recommender systems have emerged as a key research direction that integrates both conversational and recommendation techniques to better capture user preferences through interactive and context-aware conversations. Within these systems, LLMs have been explored as a main reasoning component that enables personalized recommendations through interactive dialogues with users.</text:p>
      <text:p text:style-name="P20"/>
      <text:p text:style-name="P21"><text:s text:c="2"/>Friedman et al. [2] investigate how LLMs can be incorporated into conversational recommendation pipelines and highlight their potential to improve user engagement and recommendation quality. Their work demonstrates the capability of LLMs in extracting user preferences from an ongoing conversation and generating relevant recommendations in natural language. Building on this perspective, Zhu et al. [3] present how traditional collaborative filtering methods can be effectively combined with LLM‑based reasoning. In this sense, they<text:s/>Spropose a Collaborative Retrieval Augmented Generation (CRAG) framework that integrates black‑box LLMs with collaborative retrieval methods. This combination enables the CRAG framework to improve conversational recommendation performance. Similarly, Li et al. [4] propose a framework, named ChatCRS, that improves recommendation accuracy. Their framework incorporates two main agents: The first one is a knowledge retrieval agent, which enables LLMs to reason over external knowledge base and incorporate relevant information. The second is a goal planning agent responsible for dialogue goal prediction. By integrating retrieved knowledge and predicted goals into the LLM’s input, the ChatCRS framework generates recommendations that are better aligned with users' intents. These works illustrate how LLMs can be combined with traditional recommendation techniques such as collaborative filtering and knowledge-based retrieval in order to improve recommendation performance. Due to the black-box nature of LLMs, the question of how to provide transparent and trustworthy explanations of the generated recommendations remains open.</text:p>
      <text:p text:style-name="P22"/>
      <text:p text:style-name="P23"/>
      <text:p text:style-name="P24">2.2 Explainable recommender systems</text:p>
      <text:p text:style-name="P25"><text:s text:c="3"/>Explainable recommendation refers to personalized recommendation methods that not only deliver users with relevant recommendations, but also provide explicit justification for why a specific item has been recommended [5]. Providing explanations for recommendations presents a crucial step towards transparent and trustworthy systems. This challenge has motivated researchers to study<text:s/><text:soft-page-break/>explainable recommender systems aiming to improve the interpretability of recommendation, strengthen user trust, and boost decision support capabilities.</text:p>
      <text:p text:style-name="P26"/>
      <text:p text:style-name="P27"><text:s text:c="4"/>Early work in explainable AI techniques introduced model-agnostic explanation methods such as LIME and SHAP [6], which aim to provide interpretable approximations of complex model behavior. SHAP provides a global view of model behavior by assigning importance values to each feature, illustrating how variations in features such as vibration or temperature influence predictions. In contrast, LIME focuses on local interpretability by explaining individual predictions, and illustrating how specific sensor readings contribute to a given fault diagnosis. These approaches have been widely adopted since they can be applied to different recommendation models without requiring modifications to the underlying architecture. Another line of research focuses on attention mechanisms, where attention weights are often used to identify user behaviors or item features that contribute most to the recommendation [7]. These methods offer intuitive insights by highlighting the key interactions between users and items considered by the model. However, such interpretations remain limited due to the fact that attention does not always correspond to the true decision process of the model [8]. More recently, explainable recommendations consider knowledge graphs as a way to provide interpretable insights. The core idea of these methods is to enrich item relationships with external knowledge and perform reasoning along knowledge paths to better capture user preferences and behavioral patterns. In this context, KSR [9] incorporates knowledge base information into sequential recommendation through a Key-Value Memory Network (KV-MN), which enables more informed and interpretable predictions. Similarly, KPRN [10] captures dependencies among entities and uses attention mechanisms to identify meaningful knowledge paths, which can serve as explanations for the generated recommendations. These methods are constrained by the static structure of knowledge graphs, their limited ability to adapt to dynamic interactions, and the difficulty to generate natural‑language explanations that meet users expectations</text:p>
      <text:p text:style-name="P28"/>
      <text:p text:style-name="P29"/>
      <text:p text:style-name="P30">2.3 AutoML for recommender systems</text:p>
      <text:p text:style-name="P31"><text:s text:c="4"/>AutoML has been extensively explored as a framework to automate some components or the whole machine learning pipeline, including model selection and hyperparameter tuning. Recently, AutoML has emerged as a promising direction for optimizing recommender systems [11, 12].</text:p>
      <text:p text:style-name="P32"><text:s text:c="3"/></text:p>
      <text:p text:style-name="P33"><text:s text:c="4"/>In this context, Liu et al. [13] propose an AutoML framework that automatically searches for beneficial feature interactions. The effectiveness of the proposed framework was demonstrated on a recommender system, where an online test showed significant improvements in recommendation performance. Their work highlights how AutoML can reduce manual feature engineering and improve predictive accuracy in large-scale recommendation settings. Some recent studies have leveraged AutoML to optimize recommender systems through neural architecture search (NAS). For instance, Zhang et al. [14] propose a framework that automatically designs neural network architectures by finding the most efficient architectures and identifying configurations that balance model complexity and performance. Despite these advances, the application of AutoML to conversational recommender systems remains limited. Existing works focus mainly on improving accuracy without considering conversational systems that combine retrieval, reasoning, dialogue management, and explanation modules.</text:p>
      <text:p text:style-name="P34"><text:s text:c="2"/></text:p>
      <text:p text:style-name="P35"/>
      <text:p text:style-name="P36"/>
      <text:p text:style-name="P37"/>
      <text:p text:style-name="P38"/>
      <text:p text:style-name="P39"/>
      <text:p text:style-name="P40"/>
      <text:p text:style-name="P41"/>
      <text:soft-page-break/>
      <text:p text:style-name="P42">3. Proposed system</text:p>
      <text:p text:style-name="P43"/>
      <text:p text:style-name="P44"><text:s text:c="3"/>In this work, we propose an explainable conversational recommender system based on LLMs. <text:s/>The present system integrates XAI techniques to generate transparent and user-understandable explanations for its recommendations. In addition, we investigate the role of AutoML as an optimization layer in order to enhance recommendation quality and explanation coherence…...</text:p>
      <text:p text:style-name="P45"/>
      <text:p text:style-name="P46"/>
      <text:p text:style-name="P47"><text:span text:style-name="T48"><draw:frame draw:z-index="251658240" draw:style-name="a0" draw:name="Image4" text:anchor-type="paragraph" svg:x="0in" svg:y="0in" svg:width="6.69291in" svg:height="2.15276in" style:rel-width="scale" style:rel-height="scale"><draw:image xlink:href="media/image1.png" xlink:type="simple" xlink:show="embed" xlink:actuate="onLoad"/><svg:title/><svg:desc/></draw:frame></text:span></text:p>
      <text:p text:style-name="P49"/>
      <text:p text:style-name="P50"/>
      <text:p text:style-name="P51">References</text:p>
      <text:p text:style-name="P52"/>
      <text:p text:style-name="P53">[1] Smajić, A., Karlović, R., Bobanović Dasko, M., &amp; Lorencin, I. (2025). Large language models for structured and semi-structured data, recommender systems and knowledge base engineering: a survey of recent techniques and architectures. Electronics, 14(15), 3153.</text:p>
      <text:p text:style-name="P54">[2] Friedman, L., Ahuja, S., Allen, D., Tan, Z., Sidahmed, H., Long, C., ... &amp; Tiwari, M. (2023). Leveraging large language models in conversational recommender systems. arXiv preprint arXiv:2305.07961.</text:p>
      <text:p text:style-name="P55">[3]Zhu, Y., Wan, C., Steck, H., Liang, D., Feng, Y., Kallus, N., &amp; Li, J. (2025, April). Collaborative retrieval for large language model-based conversational recommender systems. In Proceedings of the ACM on Web Conference 2025 (pp. 3323-3334).</text:p>
      <text:p text:style-name="P56">[4] Li, C., Deng, Y., Hu, H., Kan, M. Y., &amp; Li, H. (2025, April). Chatcrs: Incorporating external knowledge and goal guidance for llm-based conversational recommender systems. In Findings of the Association for Computational Linguistics: NAACL 2025 (pp. 295-312).</text:p>
      <text:p text:style-name="P57"><text:span text:style-name="T58">[5] Friedrich, G., &amp; Zanker, M. (2011). A taxonomy for generating explanations in recommender systems. </text:span><text:span text:style-name="T59">AI Magazine, 32(3), 90-98.</text:span></text:p>
      <text:p text:style-name="P60"><text:span text:style-name="T61">[6]Salih, A. M., Raisi‐Estabragh, Z., Galazzo, I. B., Radeva, P., Petersen, S. E., Lekadir, K., &amp; Menegaz, G. (2025).<text:s/></text:span><text:span text:style-name="T62">A perspective on explainable artificial intelligence methods: SHAP and LIME. Advanced Intelligent Systems, 7(1), 2400304.</text:span></text:p>
      <text:p text:style-name="P63"><text:span text:style-name="T64">[7]Li, J., Ren, P., Chen, Z., Ren, Z., Lian, T., &amp; Ma, J. (2017, November).<text:s/></text:span><text:span text:style-name="T65">Neural attentive session-based recommendation. In Proceedings of the 2017 ACM on Conference on Information and Knowledge Management (pp. 1419-1428).</text:span></text:p>
      <text:p text:style-name="P66">[8]Serrano, S., &amp; Smith, N. A. (2019, July). Is attention interpretable?. In Proceedings of the 57th annual meeting of the association for computational linguistics (pp. 2931-2951).</text:p>
      <text:p text:style-name="P67">[9] Jin Huang, Wayne Xin Zhao, Hongjian Dou, Ji-Rong Wen, and Edward Y Chang. 2018. Improving Sequential Recommendation with Knowledge-Enhanced Memory Networks. In SIGIR.</text:p>
      <text:p text:style-name="P68">[10] Canran Xu Xiangnan He Yixin Cao Xiang Wang, Dingxian Wang and Tat-Seng Chua. 2019. Explainable Reasoning over Knowledge Graph Paths for Recommendation. In AAAI.</text:p>
      <text:p text:style-name="P69">[11] Zheng, R., Qu, L., Cui, B., Shi, Y., &amp; Yin, H. (2023). Automl for deep recommender systems: A survey. ACM Transactions on Information Systems, 41(4), 1-38.</text:p>
      <text:soft-page-break/>
      <text:p text:style-name="P70">[12] Vente, T., Wegmeth, L., &amp; Beel, J. (2025, June). The potential of automl for recommender systems. In Adjunct Proceedings of the 33rd ACM Conference on User Modeling, Adaptation and Personalization (pp. 371-378).</text:p>
      <text:p text:style-name="P71"><text:span text:style-name="T72">[13] Liu, B., Zhu, C., Li, G., Zhang, W., Lai, J., Tang, R., ...<text:s/></text:span><text:span text:style-name="T73">&amp; Yu, Y. (2020, August). Autofis: Automatic feature interaction selection in factorization models for click-through rate prediction. In proceedings of the 26th ACM SIGKDD international conference on knowledge discovery &amp; data mining (pp. 2636-2645).</text:span></text:p>
      <text:p text:style-name="P74"><text:span text:style-name="T75">[14] Zhang, T., Cheng, D., He, Y., Chen, Z., Dai, X., Xiong, L., ... &amp; Wen, W. (2023, April). NASRec: weight sharing neural architecture search for recommender systems. In Proceedings of the ACM Web Conference 2023 (pp. 1199-1207).</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Kp" svg:font-family="Kp" style:font-family-generic="roman"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 style:display-name="Default" style:family="paragraph">
      <style:text-properties style:font-name="Kp" style:font-name-asian="Kp" style:font-name-complex="Kp" fo:color="#000000"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SP23-BAF-066) NAZIR HASSAN</dc:creator>
    <meta:creation-date>2026-02-23T03:57:00Z</meta:creation-date>
    <dc:date>2026-04-06T20:47:00Z</dc:date>
    <meta:template xlink:href="Normal.dotm" xlink:type="simple"/>
    <meta:editing-cycles>14</meta:editing-cycles>
    <meta:editing-duration>PT532920S</meta:editing-duration>
    <meta:document-statistic meta:page-count="4" meta:paragraph-count="37" meta:word-count="1383" meta:character-count="10005" meta:row-count="157" meta:non-whitespace-character-count="8659"/>
  </office:meta>
</office:document-meta>
</file>